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LOESSChart/meta.xml" manifest:media-type="text/xml"/>
  <manifest:file-entry manifest:full-path="LOESSChart/styles.xml" manifest:media-type="text/xml"/>
  <manifest:file-entry manifest:full-path="LOESSChart/content.xml" manifest:media-type="text/xml"/>
  <manifest:file-entry manifest:full-path="LOESSChart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LOESSChart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2.7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OESS Demo" table:style-name="ta1">
        <table:shapes>
          <draw:frame draw:z-index="0" draw:style-name="gr1" draw:text-style-name="P1" svg:width="6.2988in" svg:height="3.5429in" svg:x="0.1969in" svg:y="4.8228in">
            <draw:object draw:notify-on-update-of-ranges="'LOESS Demo'.A2:'LOESS Demo'.A41 'LOESS Demo'.A2:'LOESS Demo'.A41 'LOESS Demo'.B1:'LOESS Demo'.B1 'LOESS Demo'.B2:'LOESS Demo'.B41 'LOESS Demo'.A2:'LOESS Demo'.A41 'LOESS Demo'.C1:'LOESS Demo'.C1 'LOESS Demo'.C2:'LOESS Demo'.C41 'LOESS Demo'.A2:'LOESS Demo'.A41 'LOESS Demo'.D1:'LOESS Demo'.D1 'LOESS Demo'.D2:'LOESS Demo'.D41" xlink:href="./LOESSChart" xlink:type="simple" xlink:show="embed" xlink:actuate="onLoad">
              <loext:p/>
            </draw:object>
            <draw:image xlink:href="./ObjectReplacements/LOESSChart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 (noisy, with one outlier)</text:p>
          </table:table-cell>
          <table:table-cell office:value-type="string" calcext:value-type="string">
            <text:p>LOESS deg=1, span=0.3</text:p>
          </table:table-cell>
          <table:table-cell office:value-type="string" calcext:value-type="string">
            <text:p>LOESS deg=2, span=0.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748451086853" calcext:value-type="float">
            <text:p>4.9748451086853</text:p>
          </table:table-cell>
          <table:table-cell table:formula="of:=LOESS([.$A$2:.$A$41];[.$B$2:.$B$41];[.A2];0.3;1;0)" office:value-type="float" office:value="4.73867238044184" calcext:value-type="float">
            <text:p>4.73867238044184</text:p>
          </table:table-cell>
          <table:table-cell table:formula="of:=LOESS([.$A$2:.$A$41];[.$B$2:.$B$41];[.A2];0.3;2;0)" office:value-type="float" office:value="5.03863180461245" calcext:value-type="float">
            <text:p>5.03863180461245</text:p>
          </table:table-cell>
          <table:table-cell/>
          <table:table-cell office:value-type="string" calcext:value-type="string">
            <text:p>Robustness comparison at the outlier (X=20):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5409871637838" calcext:value-type="float">
            <text:p>5.05409871637838</text:p>
          </table:table-cell>
          <table:table-cell table:formula="of:=LOESS([.$A$2:.$A$41];[.$B$2:.$B$41];[.A3];0.3;1;0)" office:value-type="float" office:value="5.02466460563575" calcext:value-type="float">
            <text:p>5.02466460563575</text:p>
          </table:table-cell>
          <table:table-cell table:formula="of:=LOESS([.$A$2:.$A$41];[.$B$2:.$B$41];[.A3];0.3;2;0)" office:value-type="float" office:value="5.09807323845145" calcext:value-type="float">
            <text:p>5.09807323845145</text:p>
          </table:table-cell>
          <table:table-cell/>
          <table:table-cell office:value-type="string" calcext:value-type="string">
            <text:p>Non-robust (RobustIters=0):</text:p>
          </table:table-cell>
          <table:table-cell/>
          <table:table-cell table:formula="of:=LOESS([.$A$2:.$A$41];[.$B$2:.$B$41];20;0.3;1;0)" office:value-type="float" office:value="0.51166371499758" calcext:value-type="float">
            <text:p>0.51166371499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02868736685074" calcext:value-type="float">
            <text:p>5.02868736685074</text:p>
          </table:table-cell>
          <table:table-cell table:formula="of:=LOESS([.$A$2:.$A$41];[.$B$2:.$B$41];[.A4];0.3;1;0)" office:value-type="float" office:value="5.32118964444078" calcext:value-type="float">
            <text:p>5.32118964444078</text:p>
          </table:table-cell>
          <table:table-cell table:formula="of:=LOESS([.$A$2:.$A$41];[.$B$2:.$B$41];[.A4];0.3;2;0)" office:value-type="float" office:value="5.21312407944881" calcext:value-type="float">
            <text:p>5.21312407944881</text:p>
          </table:table-cell>
          <table:table-cell/>
          <table:table-cell office:value-type="string" calcext:value-type="string">
            <text:p>Robust (RobustIters=3):</text:p>
          </table:table-cell>
          <table:table-cell/>
          <table:table-cell table:formula="of:=LOESS([.$A$2:.$A$41];[.$B$2:.$B$41];20;0.3;1;3)" office:value-type="float" office:value="-2.74651106471131" calcext:value-type="float">
            <text:p>-2.74651106471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97754532954432" calcext:value-type="float">
            <text:p>5.97754532954432</text:p>
          </table:table-cell>
          <table:table-cell table:formula="of:=LOESS([.$A$2:.$A$41];[.$B$2:.$B$41];[.A5];0.3;1;0)" office:value-type="float" office:value="5.63030655340602" calcext:value-type="float">
            <text:p>5.63030655340602</text:p>
          </table:table-cell>
          <table:table-cell table:formula="of:=LOESS([.$A$2:.$A$41];[.$B$2:.$B$41];[.A5];0.3;2;0)" office:value-type="float" office:value="5.39509662621716" calcext:value-type="float">
            <text:p>5.39509662621716</text:p>
          </table:table-cell>
          <table:table-cell/>
          <table:table-cell office:value-type="string" calcext:value-type="string">
            <text:p>The robust value should sit much closer to the underlying curve.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17922460733551" calcext:value-type="float">
            <text:p>6.17922460733551</text:p>
          </table:table-cell>
          <table:table-cell table:formula="of:=LOESS([.$A$2:.$A$41];[.$B$2:.$B$41];[.A6];0.3;1;0)" office:value-type="float" office:value="5.95593050453735" calcext:value-type="float">
            <text:p>5.95593050453735</text:p>
          </table:table-cell>
          <table:table-cell table:formula="of:=LOESS([.$A$2:.$A$41];[.$B$2:.$B$41];[.A6];0.3;2;0)" office:value-type="float" office:value="5.65796822216543" calcext:value-type="float">
            <text:p>5.657968222165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1076827205527" calcext:value-type="float">
            <text:p>5.41076827205527</text:p>
          </table:table-cell>
          <table:table-cell table:formula="of:=LOESS([.$A$2:.$A$41];[.$B$2:.$B$41];[.A7];0.3;1;0)" office:value-type="float" office:value="6.29836850969237" calcext:value-type="float">
            <text:p>6.29836850969237</text:p>
          </table:table-cell>
          <table:table-cell table:formula="of:=LOESS([.$A$2:.$A$41];[.$B$2:.$B$41];[.A7];0.3;2;0)" office:value-type="float" office:value="5.9847961546969" calcext:value-type="float">
            <text:p>5.984796154696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3799559647083" calcext:value-type="float">
            <text:p>5.83799559647083</text:p>
          </table:table-cell>
          <table:table-cell table:formula="of:=LOESS([.$A$2:.$A$41];[.$B$2:.$B$41];[.A8];0.3;1;0)" office:value-type="float" office:value="6.78700027360806" calcext:value-type="float">
            <text:p>6.78700027360806</text:p>
          </table:table-cell>
          <table:table-cell table:formula="of:=LOESS([.$A$2:.$A$41];[.$B$2:.$B$41];[.A8];0.3;2;0)" office:value-type="float" office:value="6.3759544734416" calcext:value-type="float">
            <text:p>6.375954473441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0329448919152" calcext:value-type="float">
            <text:p>7.40329448919152</text:p>
          </table:table-cell>
          <table:table-cell table:formula="of:=LOESS([.$A$2:.$A$41];[.$B$2:.$B$41];[.A9];0.3;1;0)" office:value-type="float" office:value="7.37110176518471" calcext:value-type="float">
            <text:p>7.37110176518471</text:p>
          </table:table-cell>
          <table:table-cell table:formula="of:=LOESS([.$A$2:.$A$41];[.$B$2:.$B$41];[.A9];0.3;2;0)" office:value-type="float" office:value="6.95715037053548" calcext:value-type="float">
            <text:p>6.9571503705354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06229437724545" calcext:value-type="float">
            <text:p>8.06229437724545</text:p>
          </table:table-cell>
          <table:table-cell table:formula="of:=LOESS([.$A$2:.$A$41];[.$B$2:.$B$41];[.A10];0.3;1;0)" office:value-type="float" office:value="8.0082792924904" calcext:value-type="float">
            <text:p>8.0082792924904</text:p>
          </table:table-cell>
          <table:table-cell table:formula="of:=LOESS([.$A$2:.$A$41];[.$B$2:.$B$41];[.A10];0.3;2;0)" office:value-type="float" office:value="7.8894656927646" calcext:value-type="float">
            <text:p>7.88946569276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30761823612416" calcext:value-type="float">
            <text:p>8.30761823612416</text:p>
          </table:table-cell>
          <table:table-cell table:formula="of:=LOESS([.$A$2:.$A$41];[.$B$2:.$B$41];[.A11];0.3;1;0)" office:value-type="float" office:value="8.62104045196888" calcext:value-type="float">
            <text:p>8.62104045196888</text:p>
          </table:table-cell>
          <table:table-cell table:formula="of:=LOESS([.$A$2:.$A$41];[.$B$2:.$B$41];[.A11];0.3;2;0)" office:value-type="float" office:value="8.98156119691229" calcext:value-type="float">
            <text:p>8.9815611969122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77843319058362" calcext:value-type="float">
            <text:p>9.77843319058362</text:p>
          </table:table-cell>
          <table:table-cell table:formula="of:=LOESS([.$A$2:.$A$41];[.$B$2:.$B$41];[.A12];0.3;1;0)" office:value-type="float" office:value="9.10240032621208" calcext:value-type="float">
            <text:p>9.10240032621208</text:p>
          </table:table-cell>
          <table:table-cell table:formula="of:=LOESS([.$A$2:.$A$41];[.$B$2:.$B$41];[.A12];0.3;2;0)" office:value-type="float" office:value="9.8557445173296" calcext:value-type="float">
            <text:p>9.855744517329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14427843093" calcext:value-type="float">
            <text:p>11.14427843093</text:p>
          </table:table-cell>
          <table:table-cell table:formula="of:=LOESS([.$A$2:.$A$41];[.$B$2:.$B$41];[.A13];0.3;1;0)" office:value-type="float" office:value="9.31305202494639" calcext:value-type="float">
            <text:p>9.31305202494639</text:p>
          </table:table-cell>
          <table:table-cell table:formula="of:=LOESS([.$A$2:.$A$41];[.$B$2:.$B$41];[.A13];0.3;2;0)" office:value-type="float" office:value="10.4048071311954" calcext:value-type="float">
            <text:p>10.404807131195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633715276767" calcext:value-type="float">
            <text:p>10.633715276767</text:p>
          </table:table-cell>
          <table:table-cell table:formula="of:=LOESS([.$A$2:.$A$41];[.$B$2:.$B$41];[.A14];0.3;1;0)" office:value-type="float" office:value="9.12215073826887" calcext:value-type="float">
            <text:p>9.12215073826887</text:p>
          </table:table-cell>
          <table:table-cell table:formula="of:=LOESS([.$A$2:.$A$41];[.$B$2:.$B$41];[.A14];0.3;2;0)" office:value-type="float" office:value="10.5821016679667" calcext:value-type="float">
            <text:p>10.58210166796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59020624432875" calcext:value-type="float">
            <text:p>9.59020624432875</text:p>
          </table:table-cell>
          <table:table-cell table:formula="of:=LOESS([.$A$2:.$A$41];[.$B$2:.$B$41];[.A15];0.3;1;0)" office:value-type="float" office:value="8.45326801519813" calcext:value-type="float">
            <text:p>8.45326801519813</text:p>
          </table:table-cell>
          <table:table-cell table:formula="of:=LOESS([.$A$2:.$A$41];[.$B$2:.$B$41];[.A15];0.3;2;0)" office:value-type="float" office:value="10.0858008193672" calcext:value-type="float">
            <text:p>10.085800819367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11519861045761" calcext:value-type="float">
            <text:p>9.11519861045761</text:p>
          </table:table-cell>
          <table:table-cell table:formula="of:=LOESS([.$A$2:.$A$41];[.$B$2:.$B$41];[.A16];0.3;1;0)" office:value-type="float" office:value="7.55250656984529" calcext:value-type="float">
            <text:p>7.55250656984529</text:p>
          </table:table-cell>
          <table:table-cell table:formula="of:=LOESS([.$A$2:.$A$41];[.$B$2:.$B$41];[.A16];0.3;2;0)" office:value-type="float" office:value="8.1435572824637" calcext:value-type="float">
            <text:p>8.143557282463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44552639207719" calcext:value-type="float">
            <text:p>7.44552639207719</text:p>
          </table:table-cell>
          <table:table-cell table:formula="of:=LOESS([.$A$2:.$A$41];[.$B$2:.$B$41];[.A17];0.3;1;0)" office:value-type="float" office:value="6.89109435428115" calcext:value-type="float">
            <text:p>6.89109435428115</text:p>
          </table:table-cell>
          <table:table-cell table:formula="of:=LOESS([.$A$2:.$A$41];[.$B$2:.$B$41];[.A17];0.3;2;0)" office:value-type="float" office:value="5.81759756400076" calcext:value-type="float">
            <text:p>5.8175975640007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0216587755776" calcext:value-type="float">
            <text:p>4.0216587755776</text:p>
          </table:table-cell>
          <table:table-cell table:formula="of:=LOESS([.$A$2:.$A$41];[.$B$2:.$B$41];[.A18];0.3;1;0)" office:value-type="float" office:value="6.01947409563284" calcext:value-type="float">
            <text:p>6.01947409563284</text:p>
          </table:table-cell>
          <table:table-cell table:formula="of:=LOESS([.$A$2:.$A$41];[.$B$2:.$B$41];[.A18];0.3;2;0)" office:value-type="float" office:value="5.27363026665411" calcext:value-type="float">
            <text:p>5.2736302666541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5785680007416" calcext:value-type="float">
            <text:p>1.05785680007416</text:p>
          </table:table-cell>
          <table:table-cell table:formula="of:=LOESS([.$A$2:.$A$41];[.$B$2:.$B$41];[.A19];0.3;1;0)" office:value-type="float" office:value="4.57331015235052" calcext:value-type="float">
            <text:p>4.57331015235052</text:p>
          </table:table-cell>
          <table:table-cell table:formula="of:=LOESS([.$A$2:.$A$41];[.$B$2:.$B$41];[.A19];0.3;2;0)" office:value-type="float" office:value="5.36660303324589" calcext:value-type="float">
            <text:p>5.3666030332458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973976902033307" calcext:value-type="float">
            <text:p>-0.973976902033307</text:p>
          </table:table-cell>
          <table:table-cell table:formula="of:=LOESS([.$A$2:.$A$41];[.$B$2:.$B$41];[.A20];0.3;1;0)" office:value-type="float" office:value="2.62021426484978" calcext:value-type="float">
            <text:p>2.62021426484978</text:p>
          </table:table-cell>
          <table:table-cell table:formula="of:=LOESS([.$A$2:.$A$41];[.$B$2:.$B$41];[.A20];0.3;2;0)" office:value-type="float" office:value="4.52141961948342" calcext:value-type="float">
            <text:p>4.5214196194834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1744986717529" calcext:value-type="float">
            <text:p>21.1744986717529</text:p>
          </table:table-cell>
          <table:table-cell table:formula="of:=LOESS([.$A$2:.$A$41];[.$B$2:.$B$41];[.A21];0.3;1;0)" office:value-type="float" office:value="0.51166371499758" calcext:value-type="float">
            <text:p>0.51166371499758</text:p>
          </table:table-cell>
          <table:table-cell table:formula="of:=LOESS([.$A$2:.$A$41];[.$B$2:.$B$41];[.A21];0.3;2;0)" office:value-type="float" office:value="2.54639802825237" calcext:value-type="float">
            <text:p>2.5463980282523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.92461098059946" calcext:value-type="float">
            <text:p>-6.92461098059946</text:p>
          </table:table-cell>
          <table:table-cell table:formula="of:=LOESS([.$A$2:.$A$41];[.$B$2:.$B$41];[.A22];0.3;1;0)" office:value-type="float" office:value="-1.40629609281877" calcext:value-type="float">
            <text:p>-1.40629609281877</text:p>
          </table:table-cell>
          <table:table-cell table:formula="of:=LOESS([.$A$2:.$A$41];[.$B$2:.$B$41];[.A22];0.3;2;0)" office:value-type="float" office:value="-0.234157564672885" calcext:value-type="float">
            <text:p>-0.23415756467288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.16003719009601" calcext:value-type="float">
            <text:p>-8.16003719009601</text:p>
          </table:table-cell>
          <table:table-cell table:formula="of:=LOESS([.$A$2:.$A$41];[.$B$2:.$B$41];[.A23];0.3;1;0)" office:value-type="float" office:value="-3.1975155774738" calcext:value-type="float">
            <text:p>-3.1975155774738</text:p>
          </table:table-cell>
          <table:table-cell table:formula="of:=LOESS([.$A$2:.$A$41];[.$B$2:.$B$41];[.A23];0.3;2;0)" office:value-type="float" office:value="-3.98697681603322" calcext:value-type="float">
            <text:p>-3.986976816033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.3046415031235" calcext:value-type="float">
            <text:p>-8.3046415031235</text:p>
          </table:table-cell>
          <table:table-cell table:formula="of:=LOESS([.$A$2:.$A$41];[.$B$2:.$B$41];[.A24];0.3;1;0)" office:value-type="float" office:value="-4.99877721984961" calcext:value-type="float">
            <text:p>-4.99877721984961</text:p>
          </table:table-cell>
          <table:table-cell table:formula="of:=LOESS([.$A$2:.$A$41];[.$B$2:.$B$41];[.A24];0.3;2;0)" office:value-type="float" office:value="-7.89894055677819" calcext:value-type="float">
            <text:p>-7.8989405567781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.13917935473926" calcext:value-type="float">
            <text:p>-9.13917935473926</text:p>
          </table:table-cell>
          <table:table-cell table:formula="of:=LOESS([.$A$2:.$A$41];[.$B$2:.$B$41];[.A25];0.3;1;0)" office:value-type="float" office:value="-6.72195700827701" calcext:value-type="float">
            <text:p>-6.72195700827701</text:p>
          </table:table-cell>
          <table:table-cell table:formula="of:=LOESS([.$A$2:.$A$41];[.$B$2:.$B$41];[.A25];0.3;2;0)" office:value-type="float" office:value="-10.0137193287949" calcext:value-type="float">
            <text:p>-10.013719328794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.52220557470126" calcext:value-type="float">
            <text:p>-9.52220557470126</text:p>
          </table:table-cell>
          <table:table-cell table:formula="of:=LOESS([.$A$2:.$A$41];[.$B$2:.$B$41];[.A26];0.3;1;0)" office:value-type="float" office:value="-7.90361030404976" calcext:value-type="float">
            <text:p>-7.90361030404976</text:p>
          </table:table-cell>
          <table:table-cell table:formula="of:=LOESS([.$A$2:.$A$41];[.$B$2:.$B$41];[.A26];0.3;2;0)" office:value-type="float" office:value="-9.42676382918677" calcext:value-type="float">
            <text:p>-9.4267638291867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.24888143240423" calcext:value-type="float">
            <text:p>-8.24888143240423</text:p>
          </table:table-cell>
          <table:table-cell table:formula="of:=LOESS([.$A$2:.$A$41];[.$B$2:.$B$41];[.A27];0.3;1;0)" office:value-type="float" office:value="-8.09950242136903" calcext:value-type="float">
            <text:p>-8.09950242136903</text:p>
          </table:table-cell>
          <table:table-cell table:formula="of:=LOESS([.$A$2:.$A$41];[.$B$2:.$B$41];[.A27];0.3;2;0)" office:value-type="float" office:value="-8.42358454031043" calcext:value-type="float">
            <text:p>-8.4235845403104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.1803145626096" calcext:value-type="float">
            <text:p>-7.1803145626096</text:p>
          </table:table-cell>
          <table:table-cell table:formula="of:=LOESS([.$A$2:.$A$41];[.$B$2:.$B$41];[.A28];0.3;1;0)" office:value-type="float" office:value="-7.88854692217185" calcext:value-type="float">
            <text:p>-7.88854692217185</text:p>
          </table:table-cell>
          <table:table-cell table:formula="of:=LOESS([.$A$2:.$A$41];[.$B$2:.$B$41];[.A28];0.3;2;0)" office:value-type="float" office:value="-7.88574132062993" calcext:value-type="float">
            <text:p>-7.8857413206299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.49262866040838" calcext:value-type="float">
            <text:p>-7.49262866040838</text:p>
          </table:table-cell>
          <table:table-cell table:formula="of:=LOESS([.$A$2:.$A$41];[.$B$2:.$B$41];[.A29];0.3;1;0)" office:value-type="float" office:value="-7.65601111226432" calcext:value-type="float">
            <text:p>-7.65601111226432</text:p>
          </table:table-cell>
          <table:table-cell table:formula="of:=LOESS([.$A$2:.$A$41];[.$B$2:.$B$41];[.A29];0.3;2;0)" office:value-type="float" office:value="-7.30825646134273" calcext:value-type="float">
            <text:p>-7.3082564613427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.42303226220141" calcext:value-type="float">
            <text:p>-7.42303226220141</text:p>
          </table:table-cell>
          <table:table-cell table:formula="of:=LOESS([.$A$2:.$A$41];[.$B$2:.$B$41];[.A30];0.3;1;0)" office:value-type="float" office:value="-7.46629904508441" calcext:value-type="float">
            <text:p>-7.46629904508441</text:p>
          </table:table-cell>
          <table:table-cell table:formula="of:=LOESS([.$A$2:.$A$41];[.$B$2:.$B$41];[.A30];0.3;2;0)" office:value-type="float" office:value="-7.00877265651129" calcext:value-type="float">
            <text:p>-7.008772656511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.5221247230488" calcext:value-type="float">
            <text:p>-6.5221247230488</text:p>
          </table:table-cell>
          <table:table-cell table:formula="of:=LOESS([.$A$2:.$A$41];[.$B$2:.$B$41];[.A31];0.3;1;0)" office:value-type="float" office:value="-7.34278573421219" calcext:value-type="float">
            <text:p>-7.34278573421219</text:p>
          </table:table-cell>
          <table:table-cell table:formula="of:=LOESS([.$A$2:.$A$41];[.$B$2:.$B$41];[.A31];0.3;2;0)" office:value-type="float" office:value="-7.07899300558902" calcext:value-type="float">
            <text:p>-7.0789930055890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.75925764675438" calcext:value-type="float">
            <text:p>-6.75925764675438</text:p>
          </table:table-cell>
          <table:table-cell table:formula="of:=LOESS([.$A$2:.$A$41];[.$B$2:.$B$41];[.A32];0.3;1;0)" office:value-type="float" office:value="-7.26983962578319" calcext:value-type="float">
            <text:p>-7.26983962578319</text:p>
          </table:table-cell>
          <table:table-cell table:formula="of:=LOESS([.$A$2:.$A$41];[.$B$2:.$B$41];[.A32];0.3;2;0)" office:value-type="float" office:value="-7.26431393593074" calcext:value-type="float">
            <text:p>-7.2643139359307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.96911476998425" calcext:value-type="float">
            <text:p>-7.96911476998425</text:p>
          </table:table-cell>
          <table:table-cell table:formula="of:=LOESS([.$A$2:.$A$41];[.$B$2:.$B$41];[.A33];0.3;1;0)" office:value-type="float" office:value="-7.17202856657183" calcext:value-type="float">
            <text:p>-7.17202856657183</text:p>
          </table:table-cell>
          <table:table-cell table:formula="of:=LOESS([.$A$2:.$A$41];[.$B$2:.$B$41];[.A33];0.3;2;0)" office:value-type="float" office:value="-7.43739556016995" calcext:value-type="float">
            <text:p>-7.4373955601699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.94297613874856" calcext:value-type="float">
            <text:p>-7.94297613874856</text:p>
          </table:table-cell>
          <table:table-cell table:formula="of:=LOESS([.$A$2:.$A$41];[.$B$2:.$B$41];[.A34];0.3;1;0)" office:value-type="float" office:value="-6.93096481843182" calcext:value-type="float">
            <text:p>-6.93096481843182</text:p>
          </table:table-cell>
          <table:table-cell table:formula="of:=LOESS([.$A$2:.$A$41];[.$B$2:.$B$41];[.A34];0.3;2;0)" office:value-type="float" office:value="-7.61863556002609" calcext:value-type="float">
            <text:p>-7.6186355600260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.01699425830506" calcext:value-type="float">
            <text:p>-7.01699425830506</text:p>
          </table:table-cell>
          <table:table-cell table:formula="of:=LOESS([.$A$2:.$A$41];[.$B$2:.$B$41];[.A35];0.3;1;0)" office:value-type="float" office:value="-6.43580427008024" calcext:value-type="float">
            <text:p>-6.43580427008024</text:p>
          </table:table-cell>
          <table:table-cell table:formula="of:=LOESS([.$A$2:.$A$41];[.$B$2:.$B$41];[.A35];0.3;2;0)" office:value-type="float" office:value="-7.55290827211471" calcext:value-type="float">
            <text:p>-7.5529082721147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.8810442243086" calcext:value-type="float">
            <text:p>-6.8810442243086</text:p>
          </table:table-cell>
          <table:table-cell table:formula="of:=LOESS([.$A$2:.$A$41];[.$B$2:.$B$41];[.A36];0.3;1;0)" office:value-type="float" office:value="-5.6014838088872" calcext:value-type="float">
            <text:p>-5.6014838088872</text:p>
          </table:table-cell>
          <table:table-cell table:formula="of:=LOESS([.$A$2:.$A$41];[.$B$2:.$B$41];[.A36];0.3;2;0)" office:value-type="float" office:value="-6.87668385947739" calcext:value-type="float">
            <text:p>-6.8766838594773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6.38836948416188" calcext:value-type="float">
            <text:p>-6.38836948416188</text:p>
          </table:table-cell>
          <table:table-cell table:formula="of:=LOESS([.$A$2:.$A$41];[.$B$2:.$B$41];[.A37];0.3;1;0)" office:value-type="float" office:value="-4.14710309991867" calcext:value-type="float">
            <text:p>-4.14710309991867</text:p>
          </table:table-cell>
          <table:table-cell table:formula="of:=LOESS([.$A$2:.$A$41];[.$B$2:.$B$41];[.A37];0.3;2;0)" office:value-type="float" office:value="-5.57619423558048" calcext:value-type="float">
            <text:p>-5.5761942355804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.90880789680695" calcext:value-type="float">
            <text:p>-3.90880789680695</text:p>
          </table:table-cell>
          <table:table-cell table:formula="of:=LOESS([.$A$2:.$A$41];[.$B$2:.$B$41];[.A38];0.3;1;0)" office:value-type="float" office:value="-2.67118054966704" calcext:value-type="float">
            <text:p>-2.67118054966704</text:p>
          </table:table-cell>
          <table:table-cell table:formula="of:=LOESS([.$A$2:.$A$41];[.$B$2:.$B$41];[.A38];0.3;2;0)" office:value-type="float" office:value="-3.87541424793052" calcext:value-type="float">
            <text:p>-3.8754142479305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97065235275802" calcext:value-type="float">
            <text:p>-0.97065235275802</text:p>
          </table:table-cell>
          <table:table-cell table:formula="of:=LOESS([.$A$2:.$A$41];[.$B$2:.$B$41];[.A39];0.3;1;0)" office:value-type="float" office:value="-1.15034131124736" calcext:value-type="float">
            <text:p>-1.15034131124736</text:p>
          </table:table-cell>
          <table:table-cell table:formula="of:=LOESS([.$A$2:.$A$41];[.$B$2:.$B$41];[.A39];0.3;2;0)" office:value-type="float" office:value="-1.73688614505492" calcext:value-type="float">
            <text:p>-1.7368861450549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00866102651854" calcext:value-type="float">
            <text:p>1.00866102651854</text:p>
          </table:table-cell>
          <table:table-cell table:formula="of:=LOESS([.$A$2:.$A$41];[.$B$2:.$B$41];[.A40];0.3;1;0)" office:value-type="float" office:value="0.432242054521162" calcext:value-type="float">
            <text:p>0.432242054521162</text:p>
          </table:table-cell>
          <table:table-cell table:formula="of:=LOESS([.$A$2:.$A$41];[.$B$2:.$B$41];[.A40];0.3;2;0)" office:value-type="float" office:value="0.852887670588194" calcext:value-type="float">
            <text:p>0.85288767058819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3967764380428" calcext:value-type="float">
            <text:p>3.53967764380428</text:p>
          </table:table-cell>
          <table:table-cell table:formula="of:=LOESS([.$A$2:.$A$41];[.$B$2:.$B$41];[.A41];0.3;1;0)" office:value-type="float" office:value="2.0816001720788" calcext:value-type="float">
            <text:p>2.0816001720788</text:p>
          </table:table-cell>
          <table:table-cell table:formula="of:=LOESS([.$A$2:.$A$41];[.$B$2:.$B$41];[.A41];0.3;2;0)" office:value-type="float" office:value="3.886500474987" calcext:value-type="float">
            <text:p>3.886500474987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s Ctrl+Shift+F9 once after opening this file to calculate the formulas (saved with AutoCalculate off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 21 (X=20) has a deliberate +25 outlier in Y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y editing Span/Degree/RobustIters in any formula, or dragging a formula to a new row, to see the effect.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=LOESS(XRange; YRange; X0; [Span]; [Degree]; [RobustIters]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 style:data-style-name="N2" text:time-value="01:43:32.061115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3T01:01:43.903682950</meta:creation-date>
    <dc:date>2026-07-03T01:44:06.528423237</dc:date>
    <meta:editing-duration>PT47S</meta:editing-duration>
    <meta:editing-cycles>2</meta:editing-cycles>
    <meta:generator>LibreOffice/26.2.4.2$Linux_X86_64 LibreOffice_project/620$Build-2</meta:generator>
    <meta:document-statistic meta:table-count="1" meta:cell-count="175" meta:object-count="1"/>
  </office:meta>
</office:document-meta>
</file>

<file path=LOESSChart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cm" xlink:href=".." xlink:type="simple" chart:class="chart:scatter" chart:style-name="ch1">
        <chart:title svg:x="5.442cm" svg:y="0.316cm" chart:style-name="ch2">
          <text:p>LOESS smoothing demo</text:p>
        </chart:title>
        <chart:plot-area chart:style-name="ch3" svg:x="0.32cm" svg:y="1.275cm" svg:width="15.36cm" svg:height="7.545cm">
          <chart:coordinate-region svg:x="1.068cm" svg:y="1.474cm" svg:width="14.419cm" svg:height="7.147cm"/>
          <chart:axis chart:dimension="x" chart:name="primary-x" chart:style-name="ch4" chartooo:axis-type="auto">
            <chart:categories table:cell-range-address="'LOESS Demo'.A2:'LOESS Demo'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OESS Demo'.B2:'LOESS Demo'.B41" chart:label-cell-address="'LOESS Demo'.B1:'LOESS Demo'.B1" chart:class="chart:scatter">
            <chart:domain table:cell-range-address="'LOESS Demo'.A2:'LOESS Demo'.A41"/>
            <chart:data-point chart:repeated="40"/>
          </chart:series>
          <chart:series chart:style-name="ch8" chart:values-cell-range-address="'LOESS Demo'.C2:'LOESS Demo'.C41" chart:label-cell-address="'LOESS Demo'.C1:'LOESS Demo'.C1" chart:class="chart:scatter">
            <chart:data-point chart:repeated="40"/>
          </chart:series>
          <chart:series chart:style-name="ch9" chart:values-cell-range-address="'LOESS Demo'.D2:'LOESS Demo'.D41" chart:label-cell-address="'LOESS Demo'.D1:'LOESS Demo'.D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(noisy, with one outlier)</text:p>
                <draw:g>
                  <svg:desc>'LOESS Demo'.B1:'LOESS Demo'.B1</svg:desc>
                </draw:g>
              </table:table-cell>
              <table:table-cell office:value-type="string">
                <text:p>LOESS deg=1, span=0.3</text:p>
                <draw:g>
                  <svg:desc>'LOESS Demo'.C1:'LOESS Demo'.C1</svg:desc>
                </draw:g>
              </table:table-cell>
              <table:table-cell office:value-type="string">
                <text:p>LOESS deg=2, span=0.3</text:p>
                <draw:g>
                  <svg:desc>'LOESS Demo'.D1:'LOESS Demo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OESS Demo'.A2:'LOESS Demo'.A41</svg:desc>
                </draw:g>
              </table:table-cell>
              <table:table-cell office:value-type="float" office:value="1">
                <text:p>1</text:p>
                <draw:g>
                  <svg:desc>'LOESS Demo'.A2:'LOESS Demo'.A41</svg:desc>
                </draw:g>
              </table:table-cell>
              <table:table-cell office:value-type="float" office:value="4.9748451086853">
                <text:p>4.9748451086853</text:p>
                <draw:g>
                  <svg:desc>'LOESS Demo'.B2:'LOESS Demo'.B41</svg:desc>
                </draw:g>
              </table:table-cell>
              <table:table-cell office:value-type="float" office:value="4.73867238044184">
                <text:p>4.73867238044184</text:p>
                <draw:g>
                  <svg:desc>'LOESS Demo'.C2:'LOESS Demo'.C41</svg:desc>
                </draw:g>
              </table:table-cell>
              <table:table-cell office:value-type="float" office:value="5.03863180461245">
                <text:p>5.03863180461245</text:p>
                <draw:g>
                  <svg:desc>'LOESS Demo'.D2:'LOESS Demo'.D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05409871637838">
                <text:p>5.05409871637838</text:p>
              </table:table-cell>
              <table:table-cell office:value-type="float" office:value="5.02466460563575">
                <text:p>5.02466460563575</text:p>
              </table:table-cell>
              <table:table-cell office:value-type="float" office:value="5.09807323845145">
                <text:p>5.098073238451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02868736685074">
                <text:p>5.02868736685074</text:p>
              </table:table-cell>
              <table:table-cell office:value-type="float" office:value="5.32118964444078">
                <text:p>5.32118964444078</text:p>
              </table:table-cell>
              <table:table-cell office:value-type="float" office:value="5.21312407944881">
                <text:p>5.213124079448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97754532954432">
                <text:p>5.97754532954432</text:p>
              </table:table-cell>
              <table:table-cell office:value-type="float" office:value="5.63030655340602">
                <text:p>5.63030655340602</text:p>
              </table:table-cell>
              <table:table-cell office:value-type="float" office:value="5.39509662621716">
                <text:p>5.395096626217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17922460733551">
                <text:p>6.17922460733551</text:p>
              </table:table-cell>
              <table:table-cell office:value-type="float" office:value="5.95593050453735">
                <text:p>5.95593050453735</text:p>
              </table:table-cell>
              <table:table-cell office:value-type="float" office:value="5.65796822216543">
                <text:p>5.657968222165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41076827205527">
                <text:p>5.41076827205527</text:p>
              </table:table-cell>
              <table:table-cell office:value-type="float" office:value="6.29836850969237">
                <text:p>6.29836850969237</text:p>
              </table:table-cell>
              <table:table-cell office:value-type="float" office:value="5.9847961546969">
                <text:p>5.98479615469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83799559647083">
                <text:p>5.83799559647083</text:p>
              </table:table-cell>
              <table:table-cell office:value-type="float" office:value="6.78700027360806">
                <text:p>6.78700027360806</text:p>
              </table:table-cell>
              <table:table-cell office:value-type="float" office:value="6.3759544734416">
                <text:p>6.37595447344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40329448919152">
                <text:p>7.40329448919152</text:p>
              </table:table-cell>
              <table:table-cell office:value-type="float" office:value="7.37110176518471">
                <text:p>7.37110176518471</text:p>
              </table:table-cell>
              <table:table-cell office:value-type="float" office:value="6.95715037053548">
                <text:p>6.957150370535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06229437724545">
                <text:p>8.06229437724545</text:p>
              </table:table-cell>
              <table:table-cell office:value-type="float" office:value="8.0082792924904">
                <text:p>8.0082792924904</text:p>
              </table:table-cell>
              <table:table-cell office:value-type="float" office:value="7.8894656927646">
                <text:p>7.88946569276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30761823612416">
                <text:p>8.30761823612416</text:p>
              </table:table-cell>
              <table:table-cell office:value-type="float" office:value="8.62104045196888">
                <text:p>8.62104045196888</text:p>
              </table:table-cell>
              <table:table-cell office:value-type="float" office:value="8.98156119691229">
                <text:p>8.981561196912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77843319058362">
                <text:p>9.77843319058362</text:p>
              </table:table-cell>
              <table:table-cell office:value-type="float" office:value="9.10240032621208">
                <text:p>9.10240032621208</text:p>
              </table:table-cell>
              <table:table-cell office:value-type="float" office:value="9.8557445173296">
                <text:p>9.85574451732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14427843093">
                <text:p>11.14427843093</text:p>
              </table:table-cell>
              <table:table-cell office:value-type="float" office:value="9.31305202494639">
                <text:p>9.31305202494639</text:p>
              </table:table-cell>
              <table:table-cell office:value-type="float" office:value="10.4048071311954">
                <text:p>10.40480713119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633715276767">
                <text:p>10.633715276767</text:p>
              </table:table-cell>
              <table:table-cell office:value-type="float" office:value="9.12215073826887">
                <text:p>9.12215073826887</text:p>
              </table:table-cell>
              <table:table-cell office:value-type="float" office:value="10.5821016679667">
                <text:p>10.5821016679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59020624432875">
                <text:p>9.59020624432875</text:p>
              </table:table-cell>
              <table:table-cell office:value-type="float" office:value="8.45326801519813">
                <text:p>8.45326801519813</text:p>
              </table:table-cell>
              <table:table-cell office:value-type="float" office:value="10.0858008193672">
                <text:p>10.08580081936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11519861045761">
                <text:p>9.11519861045761</text:p>
              </table:table-cell>
              <table:table-cell office:value-type="float" office:value="7.55250656984529">
                <text:p>7.55250656984529</text:p>
              </table:table-cell>
              <table:table-cell office:value-type="float" office:value="8.1435572824637">
                <text:p>8.14355728246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44552639207719">
                <text:p>7.44552639207719</text:p>
              </table:table-cell>
              <table:table-cell office:value-type="float" office:value="6.89109435428115">
                <text:p>6.89109435428115</text:p>
              </table:table-cell>
              <table:table-cell office:value-type="float" office:value="5.81759756400076">
                <text:p>5.817597564000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0216587755776">
                <text:p>4.0216587755776</text:p>
              </table:table-cell>
              <table:table-cell office:value-type="float" office:value="6.01947409563284">
                <text:p>6.01947409563284</text:p>
              </table:table-cell>
              <table:table-cell office:value-type="float" office:value="5.27363026665411">
                <text:p>5.273630266654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05785680007416">
                <text:p>1.05785680007416</text:p>
              </table:table-cell>
              <table:table-cell office:value-type="float" office:value="4.57331015235052">
                <text:p>4.57331015235052</text:p>
              </table:table-cell>
              <table:table-cell office:value-type="float" office:value="5.36660303324589">
                <text:p>5.366603033245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973976902033307">
                <text:p>-0.973976902033307</text:p>
              </table:table-cell>
              <table:table-cell office:value-type="float" office:value="2.62021426484978">
                <text:p>2.62021426484978</text:p>
              </table:table-cell>
              <table:table-cell office:value-type="float" office:value="4.52141961948342">
                <text:p>4.521419619483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.1744986717529">
                <text:p>21.1744986717529</text:p>
              </table:table-cell>
              <table:table-cell office:value-type="float" office:value="0.51166371499758">
                <text:p>0.51166371499758</text:p>
              </table:table-cell>
              <table:table-cell office:value-type="float" office:value="2.54639802825237">
                <text:p>2.5463980282523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6.92461098059946">
                <text:p>-6.92461098059946</text:p>
              </table:table-cell>
              <table:table-cell office:value-type="float" office:value="-1.40629609281877">
                <text:p>-1.40629609281877</text:p>
              </table:table-cell>
              <table:table-cell office:value-type="float" office:value="-0.234157564672885">
                <text:p>-0.2341575646728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8.16003719009601">
                <text:p>-8.16003719009601</text:p>
              </table:table-cell>
              <table:table-cell office:value-type="float" office:value="-3.1975155774738">
                <text:p>-3.1975155774738</text:p>
              </table:table-cell>
              <table:table-cell office:value-type="float" office:value="-3.98697681603322">
                <text:p>-3.9869768160332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8.3046415031235">
                <text:p>-8.3046415031235</text:p>
              </table:table-cell>
              <table:table-cell office:value-type="float" office:value="-4.99877721984961">
                <text:p>-4.99877721984961</text:p>
              </table:table-cell>
              <table:table-cell office:value-type="float" office:value="-7.89894055677819">
                <text:p>-7.898940556778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9.13917935473926">
                <text:p>-9.13917935473926</text:p>
              </table:table-cell>
              <table:table-cell office:value-type="float" office:value="-6.72195700827701">
                <text:p>-6.72195700827701</text:p>
              </table:table-cell>
              <table:table-cell office:value-type="float" office:value="-10.0137193287949">
                <text:p>-10.01371932879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9.52220557470126">
                <text:p>-9.52220557470126</text:p>
              </table:table-cell>
              <table:table-cell office:value-type="float" office:value="-7.90361030404976">
                <text:p>-7.90361030404976</text:p>
              </table:table-cell>
              <table:table-cell office:value-type="float" office:value="-9.42676382918677">
                <text:p>-9.4267638291867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8.24888143240423">
                <text:p>-8.24888143240423</text:p>
              </table:table-cell>
              <table:table-cell office:value-type="float" office:value="-8.09950242136903">
                <text:p>-8.09950242136903</text:p>
              </table:table-cell>
              <table:table-cell office:value-type="float" office:value="-8.42358454031043">
                <text:p>-8.423584540310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7.1803145626096">
                <text:p>-7.1803145626096</text:p>
              </table:table-cell>
              <table:table-cell office:value-type="float" office:value="-7.88854692217185">
                <text:p>-7.88854692217185</text:p>
              </table:table-cell>
              <table:table-cell office:value-type="float" office:value="-7.88574132062993">
                <text:p>-7.8857413206299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7.49262866040838">
                <text:p>-7.49262866040838</text:p>
              </table:table-cell>
              <table:table-cell office:value-type="float" office:value="-7.65601111226432">
                <text:p>-7.65601111226432</text:p>
              </table:table-cell>
              <table:table-cell office:value-type="float" office:value="-7.30825646134273">
                <text:p>-7.3082564613427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7.42303226220141">
                <text:p>-7.42303226220141</text:p>
              </table:table-cell>
              <table:table-cell office:value-type="float" office:value="-7.46629904508441">
                <text:p>-7.46629904508441</text:p>
              </table:table-cell>
              <table:table-cell office:value-type="float" office:value="-7.00877265651129">
                <text:p>-7.008772656511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6.5221247230488">
                <text:p>-6.5221247230488</text:p>
              </table:table-cell>
              <table:table-cell office:value-type="float" office:value="-7.34278573421219">
                <text:p>-7.34278573421219</text:p>
              </table:table-cell>
              <table:table-cell office:value-type="float" office:value="-7.07899300558902">
                <text:p>-7.078993005589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6.75925764675438">
                <text:p>-6.75925764675438</text:p>
              </table:table-cell>
              <table:table-cell office:value-type="float" office:value="-7.26983962578319">
                <text:p>-7.26983962578319</text:p>
              </table:table-cell>
              <table:table-cell office:value-type="float" office:value="-7.26431393593074">
                <text:p>-7.264313935930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7.96911476998425">
                <text:p>-7.96911476998425</text:p>
              </table:table-cell>
              <table:table-cell office:value-type="float" office:value="-7.17202856657183">
                <text:p>-7.17202856657183</text:p>
              </table:table-cell>
              <table:table-cell office:value-type="float" office:value="-7.43739556016995">
                <text:p>-7.437395560169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7.94297613874856">
                <text:p>-7.94297613874856</text:p>
              </table:table-cell>
              <table:table-cell office:value-type="float" office:value="-6.93096481843182">
                <text:p>-6.93096481843182</text:p>
              </table:table-cell>
              <table:table-cell office:value-type="float" office:value="-7.61863556002609">
                <text:p>-7.6186355600260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7.01699425830506">
                <text:p>-7.01699425830506</text:p>
              </table:table-cell>
              <table:table-cell office:value-type="float" office:value="-6.43580427008024">
                <text:p>-6.43580427008024</text:p>
              </table:table-cell>
              <table:table-cell office:value-type="float" office:value="-7.55290827211471">
                <text:p>-7.552908272114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6.8810442243086">
                <text:p>-6.8810442243086</text:p>
              </table:table-cell>
              <table:table-cell office:value-type="float" office:value="-5.6014838088872">
                <text:p>-5.6014838088872</text:p>
              </table:table-cell>
              <table:table-cell office:value-type="float" office:value="-6.87668385947739">
                <text:p>-6.8766838594773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6.38836948416188">
                <text:p>-6.38836948416188</text:p>
              </table:table-cell>
              <table:table-cell office:value-type="float" office:value="-4.14710309991867">
                <text:p>-4.14710309991867</text:p>
              </table:table-cell>
              <table:table-cell office:value-type="float" office:value="-5.57619423558048">
                <text:p>-5.5761942355804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3.90880789680695">
                <text:p>-3.90880789680695</text:p>
              </table:table-cell>
              <table:table-cell office:value-type="float" office:value="-2.67118054966704">
                <text:p>-2.67118054966704</text:p>
              </table:table-cell>
              <table:table-cell office:value-type="float" office:value="-3.87541424793052">
                <text:p>-3.8754142479305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0.97065235275802">
                <text:p>-0.97065235275802</text:p>
              </table:table-cell>
              <table:table-cell office:value-type="float" office:value="-1.15034131124736">
                <text:p>-1.15034131124736</text:p>
              </table:table-cell>
              <table:table-cell office:value-type="float" office:value="-1.73688614505492">
                <text:p>-1.7368861450549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00866102651854">
                <text:p>1.00866102651854</text:p>
              </table:table-cell>
              <table:table-cell office:value-type="float" office:value="0.432242054521162">
                <text:p>0.432242054521162</text:p>
              </table:table-cell>
              <table:table-cell office:value-type="float" office:value="0.852887670588194">
                <text:p>0.8528876705881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53967764380428">
                <text:p>3.53967764380428</text:p>
              </table:table-cell>
              <table:table-cell office:value-type="float" office:value="2.0816001720788">
                <text:p>2.0816001720788</text:p>
              </table:table-cell>
              <table:table-cell office:value-type="float" office:value="3.886500474987">
                <text:p>3.886500474987</text:p>
              </table:table-cell>
            </table:table-row>
          </table:table-rows>
        </table:table>
      </chart:chart>
    </office:chart>
  </office:body>
</office:document-content>
</file>

<file path=LOESSChart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LOESSChart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