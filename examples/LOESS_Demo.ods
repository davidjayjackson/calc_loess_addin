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LOESSChart/meta.xml" manifest:media-type="text/xml"/>
  <manifest:file-entry manifest:full-path="LOESSChart/styles.xml" manifest:media-type="text/xml"/>
  <manifest:file-entry manifest:full-path="LOESSChart/content.xml" manifest:media-type="text/xml"/>
  <manifest:file-entry manifest:full-path="LOESSChart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LOESSChart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654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2.7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OESS Demo" table:style-name="ta1">
        <table:shapes>
          <draw:frame draw:z-index="0" draw:style-name="gr1" draw:text-style-name="P1" svg:width="6.2988in" svg:height="3.5429in" svg:x="0.1969in" svg:y="4.8228in">
            <draw:object draw:notify-on-update-of-ranges="'LOESS Demo'.A1:'LOESS Demo'.A1 'LOESS Demo'.A2:'LOESS Demo'.A41 'LOESS Demo'.B1:'LOESS Demo'.B1 'LOESS Demo'.B2:'LOESS Demo'.B41 'LOESS Demo'.C1:'LOESS Demo'.C1 'LOESS Demo'.C2:'LOESS Demo'.C41 'LOESS Demo'.D1:'LOESS Demo'.D1 'LOESS Demo'.D2:'LOESS Demo'.D41" xlink:href="./LOESSChart" xlink:type="simple" xlink:show="embed" xlink:actuate="onLoad">
              <loext:p/>
            </draw:object>
            <draw:image xlink:href="./ObjectReplacements/LOESSChart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 (noisy, with one outlier)</text:p>
          </table:table-cell>
          <table:table-cell office:value-type="string" calcext:value-type="string">
            <text:p>LOESS deg=1, span=0.3</text:p>
          </table:table-cell>
          <table:table-cell office:value-type="string" calcext:value-type="string">
            <text:p>LOESS deg=2, span=0.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748451086853" calcext:value-type="float">
            <text:p>4.9748451086853</text:p>
          </table:table-cell>
          <table:table-cell table:formula="of:=LOESS([.$A$2:.$A$41];[.$B$2:.$B$41];[.A2];0.3;1;0)" office:value-type="float" office:value="0" calcext:value-type="float">
            <text:p>0</text:p>
          </table:table-cell>
          <table:table-cell table:formula="of:=LOESS([.$A$2:.$A$41];[.$B$2:.$B$41];[.A2];0.3;2;0)" office:value-type="float" office:value="0" calcext:value-type="float">
            <text:p>0</text:p>
          </table:table-cell>
          <table:table-cell/>
          <table:table-cell office:value-type="string" calcext:value-type="string">
            <text:p>Robustness comparison at the outlier (X=20):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05409871637838" calcext:value-type="float">
            <text:p>5.05409871637838</text:p>
          </table:table-cell>
          <table:table-cell table:formula="of:=LOESS([.$A$2:.$A$41];[.$B$2:.$B$41];[.A3];0.3;1;0)" office:value-type="float" office:value="0" calcext:value-type="float">
            <text:p>0</text:p>
          </table:table-cell>
          <table:table-cell table:formula="of:=LOESS([.$A$2:.$A$41];[.$B$2:.$B$41];[.A3];0.3;2;0)" office:value-type="float" office:value="0" calcext:value-type="float">
            <text:p>0</text:p>
          </table:table-cell>
          <table:table-cell/>
          <table:table-cell office:value-type="string" calcext:value-type="string">
            <text:p>Non-robust (RobustIters=0):</text:p>
          </table:table-cell>
          <table:table-cell/>
          <table:table-cell table:formula="of:=LOESS([.$A$2:.$A$41];[.$B$2:.$B$41];20;0.3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02868736685074" calcext:value-type="float">
            <text:p>5.02868736685074</text:p>
          </table:table-cell>
          <table:table-cell table:formula="of:=LOESS([.$A$2:.$A$41];[.$B$2:.$B$41];[.A4];0.3;1;0)" office:value-type="float" office:value="0" calcext:value-type="float">
            <text:p>0</text:p>
          </table:table-cell>
          <table:table-cell table:formula="of:=LOESS([.$A$2:.$A$41];[.$B$2:.$B$41];[.A4];0.3;2;0)" office:value-type="float" office:value="0" calcext:value-type="float">
            <text:p>0</text:p>
          </table:table-cell>
          <table:table-cell/>
          <table:table-cell office:value-type="string" calcext:value-type="string">
            <text:p>Robust (RobustIters=3):</text:p>
          </table:table-cell>
          <table:table-cell/>
          <table:table-cell table:formula="of:=LOESS([.$A$2:.$A$41];[.$B$2:.$B$41];20;0.3;1;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97754532954432" calcext:value-type="float">
            <text:p>5.97754532954432</text:p>
          </table:table-cell>
          <table:table-cell table:formula="of:=LOESS([.$A$2:.$A$41];[.$B$2:.$B$41];[.A5];0.3;1;0)" office:value-type="float" office:value="0" calcext:value-type="float">
            <text:p>0</text:p>
          </table:table-cell>
          <table:table-cell table:formula="of:=LOESS([.$A$2:.$A$41];[.$B$2:.$B$41];[.A5];0.3;2;0)" office:value-type="float" office:value="0" calcext:value-type="float">
            <text:p>0</text:p>
          </table:table-cell>
          <table:table-cell/>
          <table:table-cell office:value-type="string" calcext:value-type="string">
            <text:p>The robust value should sit much closer to the underlying curve.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17922460733551" calcext:value-type="float">
            <text:p>6.17922460733551</text:p>
          </table:table-cell>
          <table:table-cell table:formula="of:=LOESS([.$A$2:.$A$41];[.$B$2:.$B$41];[.A6];0.3;1;0)" office:value-type="float" office:value="0" calcext:value-type="float">
            <text:p>0</text:p>
          </table:table-cell>
          <table:table-cell table:formula="of:=LOESS([.$A$2:.$A$41];[.$B$2:.$B$41];[.A6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41076827205527" calcext:value-type="float">
            <text:p>5.41076827205527</text:p>
          </table:table-cell>
          <table:table-cell table:formula="of:=LOESS([.$A$2:.$A$41];[.$B$2:.$B$41];[.A7];0.3;1;0)" office:value-type="float" office:value="0" calcext:value-type="float">
            <text:p>0</text:p>
          </table:table-cell>
          <table:table-cell table:formula="of:=LOESS([.$A$2:.$A$41];[.$B$2:.$B$41];[.A7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83799559647083" calcext:value-type="float">
            <text:p>5.83799559647083</text:p>
          </table:table-cell>
          <table:table-cell table:formula="of:=LOESS([.$A$2:.$A$41];[.$B$2:.$B$41];[.A8];0.3;1;0)" office:value-type="float" office:value="0" calcext:value-type="float">
            <text:p>0</text:p>
          </table:table-cell>
          <table:table-cell table:formula="of:=LOESS([.$A$2:.$A$41];[.$B$2:.$B$41];[.A8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40329448919152" calcext:value-type="float">
            <text:p>7.40329448919152</text:p>
          </table:table-cell>
          <table:table-cell table:formula="of:=LOESS([.$A$2:.$A$41];[.$B$2:.$B$41];[.A9];0.3;1;0)" office:value-type="float" office:value="0" calcext:value-type="float">
            <text:p>0</text:p>
          </table:table-cell>
          <table:table-cell table:formula="of:=LOESS([.$A$2:.$A$41];[.$B$2:.$B$41];[.A9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06229437724545" calcext:value-type="float">
            <text:p>8.06229437724545</text:p>
          </table:table-cell>
          <table:table-cell table:formula="of:=LOESS([.$A$2:.$A$41];[.$B$2:.$B$41];[.A10];0.3;1;0)" office:value-type="float" office:value="0" calcext:value-type="float">
            <text:p>0</text:p>
          </table:table-cell>
          <table:table-cell table:formula="of:=LOESS([.$A$2:.$A$41];[.$B$2:.$B$41];[.A10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30761823612416" calcext:value-type="float">
            <text:p>8.30761823612416</text:p>
          </table:table-cell>
          <table:table-cell table:formula="of:=LOESS([.$A$2:.$A$41];[.$B$2:.$B$41];[.A11];0.3;1;0)" office:value-type="float" office:value="0" calcext:value-type="float">
            <text:p>0</text:p>
          </table:table-cell>
          <table:table-cell table:formula="of:=LOESS([.$A$2:.$A$41];[.$B$2:.$B$41];[.A11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77843319058362" calcext:value-type="float">
            <text:p>9.77843319058362</text:p>
          </table:table-cell>
          <table:table-cell table:formula="of:=LOESS([.$A$2:.$A$41];[.$B$2:.$B$41];[.A12];0.3;1;0)" office:value-type="float" office:value="0" calcext:value-type="float">
            <text:p>0</text:p>
          </table:table-cell>
          <table:table-cell table:formula="of:=LOESS([.$A$2:.$A$41];[.$B$2:.$B$41];[.A12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14427843093" calcext:value-type="float">
            <text:p>11.14427843093</text:p>
          </table:table-cell>
          <table:table-cell table:formula="of:=LOESS([.$A$2:.$A$41];[.$B$2:.$B$41];[.A13];0.3;1;0)" office:value-type="float" office:value="0" calcext:value-type="float">
            <text:p>0</text:p>
          </table:table-cell>
          <table:table-cell table:formula="of:=LOESS([.$A$2:.$A$41];[.$B$2:.$B$41];[.A13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633715276767" calcext:value-type="float">
            <text:p>10.633715276767</text:p>
          </table:table-cell>
          <table:table-cell table:formula="of:=LOESS([.$A$2:.$A$41];[.$B$2:.$B$41];[.A14];0.3;1;0)" office:value-type="float" office:value="0" calcext:value-type="float">
            <text:p>0</text:p>
          </table:table-cell>
          <table:table-cell table:formula="of:=LOESS([.$A$2:.$A$41];[.$B$2:.$B$41];[.A14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59020624432875" calcext:value-type="float">
            <text:p>9.59020624432875</text:p>
          </table:table-cell>
          <table:table-cell table:formula="of:=LOESS([.$A$2:.$A$41];[.$B$2:.$B$41];[.A15];0.3;1;0)" office:value-type="float" office:value="0" calcext:value-type="float">
            <text:p>0</text:p>
          </table:table-cell>
          <table:table-cell table:formula="of:=LOESS([.$A$2:.$A$41];[.$B$2:.$B$41];[.A15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11519861045761" calcext:value-type="float">
            <text:p>9.11519861045761</text:p>
          </table:table-cell>
          <table:table-cell table:formula="of:=LOESS([.$A$2:.$A$41];[.$B$2:.$B$41];[.A16];0.3;1;0)" office:value-type="float" office:value="0" calcext:value-type="float">
            <text:p>0</text:p>
          </table:table-cell>
          <table:table-cell table:formula="of:=LOESS([.$A$2:.$A$41];[.$B$2:.$B$41];[.A16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44552639207719" calcext:value-type="float">
            <text:p>7.44552639207719</text:p>
          </table:table-cell>
          <table:table-cell table:formula="of:=LOESS([.$A$2:.$A$41];[.$B$2:.$B$41];[.A17];0.3;1;0)" office:value-type="float" office:value="0" calcext:value-type="float">
            <text:p>0</text:p>
          </table:table-cell>
          <table:table-cell table:formula="of:=LOESS([.$A$2:.$A$41];[.$B$2:.$B$41];[.A17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0216587755776" calcext:value-type="float">
            <text:p>4.0216587755776</text:p>
          </table:table-cell>
          <table:table-cell table:formula="of:=LOESS([.$A$2:.$A$41];[.$B$2:.$B$41];[.A18];0.3;1;0)" office:value-type="float" office:value="0" calcext:value-type="float">
            <text:p>0</text:p>
          </table:table-cell>
          <table:table-cell table:formula="of:=LOESS([.$A$2:.$A$41];[.$B$2:.$B$41];[.A18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5785680007416" calcext:value-type="float">
            <text:p>1.05785680007416</text:p>
          </table:table-cell>
          <table:table-cell table:formula="of:=LOESS([.$A$2:.$A$41];[.$B$2:.$B$41];[.A19];0.3;1;0)" office:value-type="float" office:value="0" calcext:value-type="float">
            <text:p>0</text:p>
          </table:table-cell>
          <table:table-cell table:formula="of:=LOESS([.$A$2:.$A$41];[.$B$2:.$B$41];[.A19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973976902033307" calcext:value-type="float">
            <text:p>-0.973976902033307</text:p>
          </table:table-cell>
          <table:table-cell table:formula="of:=LOESS([.$A$2:.$A$41];[.$B$2:.$B$41];[.A20];0.3;1;0)" office:value-type="float" office:value="0" calcext:value-type="float">
            <text:p>0</text:p>
          </table:table-cell>
          <table:table-cell table:formula="of:=LOESS([.$A$2:.$A$41];[.$B$2:.$B$41];[.A20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.1744986717529" calcext:value-type="float">
            <text:p>21.1744986717529</text:p>
          </table:table-cell>
          <table:table-cell table:formula="of:=LOESS([.$A$2:.$A$41];[.$B$2:.$B$41];[.A21];0.3;1;0)" office:value-type="float" office:value="0" calcext:value-type="float">
            <text:p>0</text:p>
          </table:table-cell>
          <table:table-cell table:formula="of:=LOESS([.$A$2:.$A$41];[.$B$2:.$B$41];[.A21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.92461098059946" calcext:value-type="float">
            <text:p>-6.92461098059946</text:p>
          </table:table-cell>
          <table:table-cell table:formula="of:=LOESS([.$A$2:.$A$41];[.$B$2:.$B$41];[.A22];0.3;1;0)" office:value-type="float" office:value="0" calcext:value-type="float">
            <text:p>0</text:p>
          </table:table-cell>
          <table:table-cell table:formula="of:=LOESS([.$A$2:.$A$41];[.$B$2:.$B$41];[.A22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.16003719009601" calcext:value-type="float">
            <text:p>-8.16003719009601</text:p>
          </table:table-cell>
          <table:table-cell table:formula="of:=LOESS([.$A$2:.$A$41];[.$B$2:.$B$41];[.A23];0.3;1;0)" office:value-type="float" office:value="0" calcext:value-type="float">
            <text:p>0</text:p>
          </table:table-cell>
          <table:table-cell table:formula="of:=LOESS([.$A$2:.$A$41];[.$B$2:.$B$41];[.A23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.3046415031235" calcext:value-type="float">
            <text:p>-8.3046415031235</text:p>
          </table:table-cell>
          <table:table-cell table:formula="of:=LOESS([.$A$2:.$A$41];[.$B$2:.$B$41];[.A24];0.3;1;0)" office:value-type="float" office:value="0" calcext:value-type="float">
            <text:p>0</text:p>
          </table:table-cell>
          <table:table-cell table:formula="of:=LOESS([.$A$2:.$A$41];[.$B$2:.$B$41];[.A24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.13917935473926" calcext:value-type="float">
            <text:p>-9.13917935473926</text:p>
          </table:table-cell>
          <table:table-cell table:formula="of:=LOESS([.$A$2:.$A$41];[.$B$2:.$B$41];[.A25];0.3;1;0)" office:value-type="float" office:value="0" calcext:value-type="float">
            <text:p>0</text:p>
          </table:table-cell>
          <table:table-cell table:formula="of:=LOESS([.$A$2:.$A$41];[.$B$2:.$B$41];[.A25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.52220557470126" calcext:value-type="float">
            <text:p>-9.52220557470126</text:p>
          </table:table-cell>
          <table:table-cell table:formula="of:=LOESS([.$A$2:.$A$41];[.$B$2:.$B$41];[.A26];0.3;1;0)" office:value-type="float" office:value="0" calcext:value-type="float">
            <text:p>0</text:p>
          </table:table-cell>
          <table:table-cell table:formula="of:=LOESS([.$A$2:.$A$41];[.$B$2:.$B$41];[.A26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.24888143240423" calcext:value-type="float">
            <text:p>-8.24888143240423</text:p>
          </table:table-cell>
          <table:table-cell table:formula="of:=LOESS([.$A$2:.$A$41];[.$B$2:.$B$41];[.A27];0.3;1;0)" office:value-type="float" office:value="0" calcext:value-type="float">
            <text:p>0</text:p>
          </table:table-cell>
          <table:table-cell table:formula="of:=LOESS([.$A$2:.$A$41];[.$B$2:.$B$41];[.A27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.1803145626096" calcext:value-type="float">
            <text:p>-7.1803145626096</text:p>
          </table:table-cell>
          <table:table-cell table:formula="of:=LOESS([.$A$2:.$A$41];[.$B$2:.$B$41];[.A28];0.3;1;0)" office:value-type="float" office:value="0" calcext:value-type="float">
            <text:p>0</text:p>
          </table:table-cell>
          <table:table-cell table:formula="of:=LOESS([.$A$2:.$A$41];[.$B$2:.$B$41];[.A28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.49262866040838" calcext:value-type="float">
            <text:p>-7.49262866040838</text:p>
          </table:table-cell>
          <table:table-cell table:formula="of:=LOESS([.$A$2:.$A$41];[.$B$2:.$B$41];[.A29];0.3;1;0)" office:value-type="float" office:value="0" calcext:value-type="float">
            <text:p>0</text:p>
          </table:table-cell>
          <table:table-cell table:formula="of:=LOESS([.$A$2:.$A$41];[.$B$2:.$B$41];[.A29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.42303226220141" calcext:value-type="float">
            <text:p>-7.42303226220141</text:p>
          </table:table-cell>
          <table:table-cell table:formula="of:=LOESS([.$A$2:.$A$41];[.$B$2:.$B$41];[.A30];0.3;1;0)" office:value-type="float" office:value="0" calcext:value-type="float">
            <text:p>0</text:p>
          </table:table-cell>
          <table:table-cell table:formula="of:=LOESS([.$A$2:.$A$41];[.$B$2:.$B$41];[.A30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6.5221247230488" calcext:value-type="float">
            <text:p>-6.5221247230488</text:p>
          </table:table-cell>
          <table:table-cell table:formula="of:=LOESS([.$A$2:.$A$41];[.$B$2:.$B$41];[.A31];0.3;1;0)" office:value-type="float" office:value="0" calcext:value-type="float">
            <text:p>0</text:p>
          </table:table-cell>
          <table:table-cell table:formula="of:=LOESS([.$A$2:.$A$41];[.$B$2:.$B$41];[.A31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6.75925764675438" calcext:value-type="float">
            <text:p>-6.75925764675438</text:p>
          </table:table-cell>
          <table:table-cell table:formula="of:=LOESS([.$A$2:.$A$41];[.$B$2:.$B$41];[.A32];0.3;1;0)" office:value-type="float" office:value="0" calcext:value-type="float">
            <text:p>0</text:p>
          </table:table-cell>
          <table:table-cell table:formula="of:=LOESS([.$A$2:.$A$41];[.$B$2:.$B$41];[.A32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.96911476998425" calcext:value-type="float">
            <text:p>-7.96911476998425</text:p>
          </table:table-cell>
          <table:table-cell table:formula="of:=LOESS([.$A$2:.$A$41];[.$B$2:.$B$41];[.A33];0.3;1;0)" office:value-type="float" office:value="0" calcext:value-type="float">
            <text:p>0</text:p>
          </table:table-cell>
          <table:table-cell table:formula="of:=LOESS([.$A$2:.$A$41];[.$B$2:.$B$41];[.A33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.94297613874856" calcext:value-type="float">
            <text:p>-7.94297613874856</text:p>
          </table:table-cell>
          <table:table-cell table:formula="of:=LOESS([.$A$2:.$A$41];[.$B$2:.$B$41];[.A34];0.3;1;0)" office:value-type="float" office:value="0" calcext:value-type="float">
            <text:p>0</text:p>
          </table:table-cell>
          <table:table-cell table:formula="of:=LOESS([.$A$2:.$A$41];[.$B$2:.$B$41];[.A34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.01699425830506" calcext:value-type="float">
            <text:p>-7.01699425830506</text:p>
          </table:table-cell>
          <table:table-cell table:formula="of:=LOESS([.$A$2:.$A$41];[.$B$2:.$B$41];[.A35];0.3;1;0)" office:value-type="float" office:value="0" calcext:value-type="float">
            <text:p>0</text:p>
          </table:table-cell>
          <table:table-cell table:formula="of:=LOESS([.$A$2:.$A$41];[.$B$2:.$B$41];[.A35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6.8810442243086" calcext:value-type="float">
            <text:p>-6.8810442243086</text:p>
          </table:table-cell>
          <table:table-cell table:formula="of:=LOESS([.$A$2:.$A$41];[.$B$2:.$B$41];[.A36];0.3;1;0)" office:value-type="float" office:value="0" calcext:value-type="float">
            <text:p>0</text:p>
          </table:table-cell>
          <table:table-cell table:formula="of:=LOESS([.$A$2:.$A$41];[.$B$2:.$B$41];[.A36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6.38836948416188" calcext:value-type="float">
            <text:p>-6.38836948416188</text:p>
          </table:table-cell>
          <table:table-cell table:formula="of:=LOESS([.$A$2:.$A$41];[.$B$2:.$B$41];[.A37];0.3;1;0)" office:value-type="float" office:value="0" calcext:value-type="float">
            <text:p>0</text:p>
          </table:table-cell>
          <table:table-cell table:formula="of:=LOESS([.$A$2:.$A$41];[.$B$2:.$B$41];[.A37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3.90880789680695" calcext:value-type="float">
            <text:p>-3.90880789680695</text:p>
          </table:table-cell>
          <table:table-cell table:formula="of:=LOESS([.$A$2:.$A$41];[.$B$2:.$B$41];[.A38];0.3;1;0)" office:value-type="float" office:value="0" calcext:value-type="float">
            <text:p>0</text:p>
          </table:table-cell>
          <table:table-cell table:formula="of:=LOESS([.$A$2:.$A$41];[.$B$2:.$B$41];[.A38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97065235275802" calcext:value-type="float">
            <text:p>-0.97065235275802</text:p>
          </table:table-cell>
          <table:table-cell table:formula="of:=LOESS([.$A$2:.$A$41];[.$B$2:.$B$41];[.A39];0.3;1;0)" office:value-type="float" office:value="0" calcext:value-type="float">
            <text:p>0</text:p>
          </table:table-cell>
          <table:table-cell table:formula="of:=LOESS([.$A$2:.$A$41];[.$B$2:.$B$41];[.A39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00866102651854" calcext:value-type="float">
            <text:p>1.00866102651854</text:p>
          </table:table-cell>
          <table:table-cell table:formula="of:=LOESS([.$A$2:.$A$41];[.$B$2:.$B$41];[.A40];0.3;1;0)" office:value-type="float" office:value="0" calcext:value-type="float">
            <text:p>0</text:p>
          </table:table-cell>
          <table:table-cell table:formula="of:=LOESS([.$A$2:.$A$41];[.$B$2:.$B$41];[.A40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53967764380428" calcext:value-type="float">
            <text:p>3.53967764380428</text:p>
          </table:table-cell>
          <table:table-cell table:formula="of:=LOESS([.$A$2:.$A$41];[.$B$2:.$B$41];[.A41];0.3;1;0)" office:value-type="float" office:value="0" calcext:value-type="float">
            <text:p>0</text:p>
          </table:table-cell>
          <table:table-cell table:formula="of:=LOESS([.$A$2:.$A$41];[.$B$2:.$B$41];[.A41];0.3;2;0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s Ctrl+Shift+F9 once after opening this file to calculate the formulas (saved with AutoCalculate off)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 21 (X=20) has a deliberate +25 outlier in Y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y editing Span/Degree/RobustIters in any formula, or dragging a formula to a new row, to see the effect.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=LOESS(XRange; YRange; X0; [Span]; [Degree]; [RobustIters]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3T01:01:43.903682950</meta:creation-date>
    <dc:date>2026-07-03T01:01:52.605442800</dc:date>
    <meta:editing-duration>PT11S</meta:editing-duration>
    <meta:editing-cycles>1</meta:editing-cycles>
    <meta:document-statistic meta:table-count="1" meta:cell-count="175" meta:object-count="1"/>
    <meta:generator>LibreOffice/26.2.4.2$Linux_X86_64 LibreOffice_project/620$Build-2</meta:generator>
  </office:meta>
</office:document-meta>
</file>

<file path=LOESSChart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imag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fill="solid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cm" xlink:href=".." xlink:type="simple" chart:class="chart:scatter" chart:style-name="ch1">
        <chart:title svg:x="5.442cm" svg:y="0.316cm" chart:style-name="ch2">
          <text:p>LOESS smoothing demo</text:p>
        </chart:title>
        <chart:plot-area chart:style-name="ch3" svg:x="0.32cm" svg:y="1.275cm" svg:width="15.36cm" svg:height="7.545cm">
          <chart:coordinate-region svg:x="1.068cm" svg:y="1.474cm" svg:width="14.419cm" svg:height="7.147cm"/>
          <chart:axis chart:dimension="x" chart:name="primary-x" chart:style-name="ch4" chartooo:axis-type="auto">
            <chart:categories table:cell-range-address="'LOESS Demo'.A2:'LOESS Demo'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OESS Demo'.B2:'LOESS Demo'.B41" chart:label-cell-address="'LOESS Demo'.B1:'LOESS Demo'.B1" chart:class="chart:scatter">
            <chart:domain table:cell-range-address="'LOESS Demo'.A2:'LOESS Demo'.A41"/>
            <chart:data-point chart:repeated="40"/>
          </chart:series>
          <chart:series chart:style-name="ch8" chart:values-cell-range-address="'LOESS Demo'.C2:'LOESS Demo'.C41" chart:label-cell-address="'LOESS Demo'.C1:'LOESS Demo'.C1" chart:class="chart:scatter">
            <chart:data-point chart:repeated="40"/>
          </chart:series>
          <chart:series chart:style-name="ch9" chart:values-cell-range-address="'LOESS Demo'.D2:'LOESS Demo'.D41" chart:label-cell-address="'LOESS Demo'.D1:'LOESS Demo'.D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(noisy, with one outlier)</text:p>
                <draw:g>
                  <svg:desc>'LOESS Demo'.B1:'LOESS Demo'.B1</svg:desc>
                </draw:g>
              </table:table-cell>
              <table:table-cell office:value-type="string">
                <text:p>LOESS deg=1, span=0.3</text:p>
                <draw:g>
                  <svg:desc>'LOESS Demo'.C1:'LOESS Demo'.C1</svg:desc>
                </draw:g>
              </table:table-cell>
              <table:table-cell office:value-type="string">
                <text:p>LOESS deg=2, span=0.3</text:p>
                <draw:g>
                  <svg:desc>'LOESS Demo'.D1:'LOESS Demo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LOESS Demo'.A2:'LOESS Demo'.A41</svg:desc>
                </draw:g>
              </table:table-cell>
              <table:table-cell office:value-type="float" office:value="4.9748451086853">
                <text:p>4.9748451086853</text:p>
                <draw:g>
                  <svg:desc>'LOESS Demo'.B2:'LOESS Demo'.B41</svg:desc>
                </draw:g>
              </table:table-cell>
              <table:table-cell office:value-type="float" office:value="0">
                <text:p>0</text:p>
                <draw:g>
                  <svg:desc>'LOESS Demo'.C2:'LOESS Demo'.C41</svg:desc>
                </draw:g>
              </table:table-cell>
              <table:table-cell office:value-type="float" office:value="0">
                <text:p>0</text:p>
                <draw:g>
                  <svg:desc>'LOESS Demo'.D2:'LOESS Demo'.D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05409871637838">
                <text:p>5.05409871637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.02868736685074">
                <text:p>5.02868736685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97754532954432">
                <text:p>5.97754532954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17922460733551">
                <text:p>6.17922460733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41076827205527">
                <text:p>5.41076827205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83799559647083">
                <text:p>5.83799559647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40329448919152">
                <text:p>7.40329448919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06229437724545">
                <text:p>8.06229437724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30761823612416">
                <text:p>8.30761823612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.77843319058362">
                <text:p>9.77843319058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14427843093">
                <text:p>11.14427843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.633715276767">
                <text:p>10.633715276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59020624432875">
                <text:p>9.59020624432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.11519861045761">
                <text:p>9.11519861045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44552639207719">
                <text:p>7.44552639207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0216587755776">
                <text:p>4.0216587755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05785680007416">
                <text:p>1.05785680007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973976902033307">
                <text:p>-0.973976902033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.1744986717529">
                <text:p>21.1744986717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6.92461098059946">
                <text:p>-6.92461098059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8.16003719009601">
                <text:p>-8.16003719009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8.3046415031235">
                <text:p>-8.3046415031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9.13917935473926">
                <text:p>-9.13917935473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9.52220557470126">
                <text:p>-9.52220557470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8.24888143240423">
                <text:p>-8.24888143240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7.1803145626096">
                <text:p>-7.1803145626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7.49262866040838">
                <text:p>-7.49262866040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7.42303226220141">
                <text:p>-7.42303226220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6.5221247230488">
                <text:p>-6.5221247230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6.75925764675438">
                <text:p>-6.75925764675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7.96911476998425">
                <text:p>-7.96911476998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7.94297613874856">
                <text:p>-7.94297613874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7.01699425830506">
                <text:p>-7.01699425830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6.8810442243086">
                <text:p>-6.8810442243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6.38836948416188">
                <text:p>-6.38836948416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3.90880789680695">
                <text:p>-3.90880789680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97065235275802">
                <text:p>-0.97065235275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00866102651854">
                <text:p>1.00866102651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53967764380428">
                <text:p>3.53967764380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LOESSChart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</office:meta>
</office:document-meta>
</file>

<file path=LOESSChart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